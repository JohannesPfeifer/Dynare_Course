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x" table:style-name="ta1">
        <table:shapes>
          <draw:frame draw:z-index="0" draw:style-name="gr1" draw:text-style-name="P1" svg:width="160.24mm" svg:height="110.3mm" svg:x="312.14mm" svg:y="31.61mm">
            <draw:object draw:notify-on-update-of-ranges="onx.A1:onx.A1 onx.B1:onx.U1 onx.A2:onx.A2 onx.B2:onx.U2 onx.A3:onx.A3 onx.B3:onx.U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expected positive shock</text:p>
          </table:table-cell>
          <table:table-cell office:value-type="float" office:value="1.26366314243479" calcext:value-type="float">
            <text:p>1,26366314243479</text:p>
          </table:table-cell>
          <table:table-cell office:value-type="float" office:value="1.24702985713902" calcext:value-type="float">
            <text:p>1,24702985713902</text:p>
          </table:table-cell>
          <table:table-cell office:value-type="float" office:value="1.24742070096912" calcext:value-type="float">
            <text:p>1,24742070096912</text:p>
          </table:table-cell>
          <table:table-cell office:value-type="float" office:value="1.24779306167026" calcext:value-type="float">
            <text:p>1,24779306167026</text:p>
          </table:table-cell>
          <table:table-cell office:value-type="float" office:value="1.24814727707194" calcext:value-type="float">
            <text:p>1,24814727707194</text:p>
          </table:table-cell>
          <table:table-cell office:value-type="float" office:value="1.21734297676333" calcext:value-type="float">
            <text:p>1,21734297676333</text:p>
          </table:table-cell>
          <table:table-cell office:value-type="float" office:value="1.21910405657213" calcext:value-type="float">
            <text:p>1,21910405657213</text:p>
          </table:table-cell>
          <table:table-cell office:value-type="float" office:value="1.22071692353203" calcext:value-type="float">
            <text:p>1,22071692353203</text:p>
          </table:table-cell>
          <table:table-cell office:value-type="float" office:value="1.22221098082092" calcext:value-type="float">
            <text:p>1,22221098082092</text:p>
          </table:table-cell>
          <table:table-cell office:value-type="float" office:value="1.22360756469678" calcext:value-type="float">
            <text:p>1,22360756469678</text:p>
          </table:table-cell>
          <table:table-cell office:value-type="float" office:value="1.26982478805591" calcext:value-type="float">
            <text:p>1,26982478805591</text:p>
          </table:table-cell>
          <table:table-cell office:value-type="float" office:value="1.26936155715304" calcext:value-type="float">
            <text:p>1,26936155715304</text:p>
          </table:table-cell>
          <table:table-cell office:value-type="float" office:value="1.26892823010337" calcext:value-type="float">
            <text:p>1,26892823010337</text:p>
          </table:table-cell>
          <table:table-cell office:value-type="float" office:value="1.26852714127241" calcext:value-type="float">
            <text:p>1,26852714127241</text:p>
          </table:table-cell>
          <table:table-cell office:value-type="float" office:value="1.26815707535145" calcext:value-type="float">
            <text:p>1,26815707535145</text:p>
          </table:table-cell>
          <table:table-cell office:value-type="float" office:value="1.23593605203285" calcext:value-type="float">
            <text:p>1,23593605203285</text:p>
          </table:table-cell>
          <table:table-cell office:value-type="float" office:value="1.23710674482475" calcext:value-type="float">
            <text:p>1,23710674482475</text:p>
          </table:table-cell>
          <table:table-cell office:value-type="float" office:value="1.238168643527" calcext:value-type="float">
            <text:p>1,238168643527</text:p>
          </table:table-cell>
          <table:table-cell office:value-type="float" office:value="1.23914443357517" calcext:value-type="float">
            <text:p>1,23914443357517</text:p>
          </table:table-cell>
          <table:table-cell office:value-type="float" office:value="1.24005065983521" calcext:value-type="float">
            <text:p>1,24005065983521</text:p>
          </table:table-cell>
        </table:table-row>
        <table:table-row table:style-name="ro1">
          <table:table-cell office:value-type="string" calcext:value-type="string">
            <text:p>Pre-announced positive shock</text:p>
          </table:table-cell>
          <table:table-cell office:value-type="float" office:value="1.26366314243479" calcext:value-type="float">
            <text:p>1,26366314243479</text:p>
          </table:table-cell>
          <table:table-cell office:value-type="float" office:value="1.25542331454552" calcext:value-type="float">
            <text:p>1,25542331454552</text:p>
          </table:table-cell>
          <table:table-cell office:value-type="float" office:value="1.25561765286909" calcext:value-type="float">
            <text:p>1,25561765286909</text:p>
          </table:table-cell>
          <table:table-cell office:value-type="float" office:value="1.25580285872997" calcext:value-type="float">
            <text:p>1,25580285872997</text:p>
          </table:table-cell>
          <table:table-cell office:value-type="float" office:value="1.2559790977704" calcext:value-type="float">
            <text:p>1,2559790977704</text:p>
          </table:table-cell>
          <table:table-cell office:value-type="float" office:value="1.22494055450815" calcext:value-type="float">
            <text:p>1,22494055450815</text:p>
          </table:table-cell>
          <table:table-cell office:value-type="float" office:value="1.22653254233882" calcext:value-type="float">
            <text:p>1,22653254233882</text:p>
          </table:table-cell>
          <table:table-cell office:value-type="float" office:value="1.2279850424461" calcext:value-type="float">
            <text:p>1,2279850424461</text:p>
          </table:table-cell>
          <table:table-cell office:value-type="float" office:value="1.22932778387505" calcext:value-type="float">
            <text:p>1,22932778387505</text:p>
          </table:table-cell>
          <table:table-cell office:value-type="float" office:value="1.23058229535729" calcext:value-type="float">
            <text:p>1,23058229535729</text:p>
          </table:table-cell>
          <table:table-cell office:value-type="float" office:value="1.26445576615173" calcext:value-type="float">
            <text:p>1,26445576615173</text:p>
          </table:table-cell>
          <table:table-cell office:value-type="float" office:value="1.2641837938356" calcext:value-type="float">
            <text:p>1,2641837938356</text:p>
          </table:table-cell>
          <table:table-cell office:value-type="float" office:value="1.2639306505639" calcext:value-type="float">
            <text:p>1,2639306505639</text:p>
          </table:table-cell>
          <table:table-cell office:value-type="float" office:value="1.26370022303741" calcext:value-type="float">
            <text:p>1,26370022303741</text:p>
          </table:table-cell>
          <table:table-cell office:value-type="float" office:value="1.26349249773676" calcext:value-type="float">
            <text:p>1,26349249773676</text:p>
          </table:table-cell>
          <table:table-cell office:value-type="float" office:value="1.23151138725204" calcext:value-type="float">
            <text:p>1,23151138725204</text:p>
          </table:table-cell>
          <table:table-cell office:value-type="float" office:value="1.2328055095968" calcext:value-type="float">
            <text:p>1,2328055095968</text:p>
          </table:table-cell>
          <table:table-cell office:value-type="float" office:value="1.23399081558595" calcext:value-type="float">
            <text:p>1,23399081558595</text:p>
          </table:table-cell>
          <table:table-cell office:value-type="float" office:value="1.23508918032696" calcext:value-type="float">
            <text:p>1,23508918032696</text:p>
          </table:table-cell>
          <table:table-cell office:value-type="float" office:value="1.23611651639898" calcext:value-type="float">
            <text:p>1,23611651639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9:04:22.025841616</dc:date>
    <dc:creator>Sébastien Villemot</dc:creator>
    <meta:editing-duration>PT9M11S</meta:editing-duration>
    <meta:editing-cycles>1</meta:editing-cycles>
    <meta:document-statistic meta:table-count="1" meta:cell-count="62" meta:object-count="1"/>
    <meta:generator>LibreOffice/6.0.4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0">
      <style:chart-properties chart:display-label="true" chart:logarithmic="false" chart:min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11.031cm" xlink:href=".." xlink:type="simple" chart:class="chart:line" chart:style-name="ch1">
        <chart:legend svg:x="5.459cm" svg:y="9.687cm" style:legend-expansion="custom" chartooo:width="5.764cm" chartooo:height="1.343cm" style:legend-expansion-aspect-ratio="4.29188384214445" chart:style-name="ch2"/>
        <chart:plot-area chart:style-name="ch3" table:cell-range-address="onx.A1:onx.U3" chart:data-source-has-labels="both" svg:x="0.319cm" svg:y="0.219cm" svg:width="15.384cm" svg:height="9.495cm">
          <chartooo:coordinate-region svg:x="1.231cm" svg:y="0.418cm" svg:width="14.285cm" svg:height="8.649cm"/>
          <chart:axis chart:dimension="x" chart:name="primary-x" chart:style-name="ch4" chartooo:axis-type="auto">
            <chartooo:date-scale/>
            <chart:categories table:cell-range-address="onx.B1:onx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x.B2:onx.U2" chart:label-cell-address="onx.A2:onx.A2" chart:class="chart:line">
            <chart:data-point chart:repeated="20"/>
          </chart:series>
          <chart:series chart:style-name="ch8" chart:values-cell-range-address="onx.B3:onx.U3" chart:label-cell-address="onx.A3:onx.A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nx.B1:onx.U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Unexpected positive shock</text:p>
                <draw:g>
                  <svg:desc>onx.A2:onx.A2</svg:desc>
                </draw:g>
              </table:table-cell>
              <table:table-cell office:value-type="float" office:value="1.26366314243479">
                <text:p>1.26366314243479</text:p>
                <draw:g>
                  <svg:desc>onx.B2:onx.U2</svg:desc>
                </draw:g>
              </table:table-cell>
              <table:table-cell office:value-type="float" office:value="1.24702985713902">
                <text:p>1.24702985713902</text:p>
              </table:table-cell>
              <table:table-cell office:value-type="float" office:value="1.24742070096912">
                <text:p>1.24742070096912</text:p>
              </table:table-cell>
              <table:table-cell office:value-type="float" office:value="1.24779306167026">
                <text:p>1.24779306167026</text:p>
              </table:table-cell>
              <table:table-cell office:value-type="float" office:value="1.24814727707194">
                <text:p>1.24814727707194</text:p>
              </table:table-cell>
              <table:table-cell office:value-type="float" office:value="1.21734297676333">
                <text:p>1.21734297676333</text:p>
              </table:table-cell>
              <table:table-cell office:value-type="float" office:value="1.21910405657213">
                <text:p>1.21910405657213</text:p>
              </table:table-cell>
              <table:table-cell office:value-type="float" office:value="1.22071692353203">
                <text:p>1.22071692353203</text:p>
              </table:table-cell>
              <table:table-cell office:value-type="float" office:value="1.22221098082092">
                <text:p>1.22221098082092</text:p>
              </table:table-cell>
              <table:table-cell office:value-type="float" office:value="1.22360756469678">
                <text:p>1.22360756469678</text:p>
              </table:table-cell>
              <table:table-cell office:value-type="float" office:value="1.26982478805591">
                <text:p>1.26982478805591</text:p>
              </table:table-cell>
              <table:table-cell office:value-type="float" office:value="1.26936155715304">
                <text:p>1.26936155715304</text:p>
              </table:table-cell>
              <table:table-cell office:value-type="float" office:value="1.26892823010337">
                <text:p>1.26892823010337</text:p>
              </table:table-cell>
              <table:table-cell office:value-type="float" office:value="1.26852714127241">
                <text:p>1.26852714127241</text:p>
              </table:table-cell>
              <table:table-cell office:value-type="float" office:value="1.26815707535145">
                <text:p>1.26815707535145</text:p>
              </table:table-cell>
              <table:table-cell office:value-type="float" office:value="1.23593605203285">
                <text:p>1.23593605203285</text:p>
              </table:table-cell>
              <table:table-cell office:value-type="float" office:value="1.23710674482475">
                <text:p>1.23710674482475</text:p>
              </table:table-cell>
              <table:table-cell office:value-type="float" office:value="1.238168643527">
                <text:p>1.238168643527</text:p>
              </table:table-cell>
              <table:table-cell office:value-type="float" office:value="1.23914443357517">
                <text:p>1.23914443357517</text:p>
              </table:table-cell>
              <table:table-cell office:value-type="float" office:value="1.24005065983521">
                <text:p>1.24005065983521</text:p>
              </table:table-cell>
            </table:table-row>
            <table:table-row>
              <table:table-cell office:value-type="string">
                <text:p>Pre-announced positive shock</text:p>
                <draw:g>
                  <svg:desc>onx.A3:onx.A3</svg:desc>
                </draw:g>
              </table:table-cell>
              <table:table-cell office:value-type="float" office:value="1.26366314243479">
                <text:p>1.26366314243479</text:p>
                <draw:g>
                  <svg:desc>onx.B3:onx.U3</svg:desc>
                </draw:g>
              </table:table-cell>
              <table:table-cell office:value-type="float" office:value="1.25542331454552">
                <text:p>1.25542331454552</text:p>
              </table:table-cell>
              <table:table-cell office:value-type="float" office:value="1.25561765286909">
                <text:p>1.25561765286909</text:p>
              </table:table-cell>
              <table:table-cell office:value-type="float" office:value="1.25580285872997">
                <text:p>1.25580285872997</text:p>
              </table:table-cell>
              <table:table-cell office:value-type="float" office:value="1.2559790977704">
                <text:p>1.2559790977704</text:p>
              </table:table-cell>
              <table:table-cell office:value-type="float" office:value="1.22494055450815">
                <text:p>1.22494055450815</text:p>
              </table:table-cell>
              <table:table-cell office:value-type="float" office:value="1.22653254233882">
                <text:p>1.22653254233882</text:p>
              </table:table-cell>
              <table:table-cell office:value-type="float" office:value="1.2279850424461">
                <text:p>1.2279850424461</text:p>
              </table:table-cell>
              <table:table-cell office:value-type="float" office:value="1.22932778387505">
                <text:p>1.22932778387505</text:p>
              </table:table-cell>
              <table:table-cell office:value-type="float" office:value="1.23058229535729">
                <text:p>1.23058229535729</text:p>
              </table:table-cell>
              <table:table-cell office:value-type="float" office:value="1.26445576615173">
                <text:p>1.26445576615173</text:p>
              </table:table-cell>
              <table:table-cell office:value-type="float" office:value="1.2641837938356">
                <text:p>1.2641837938356</text:p>
              </table:table-cell>
              <table:table-cell office:value-type="float" office:value="1.2639306505639">
                <text:p>1.2639306505639</text:p>
              </table:table-cell>
              <table:table-cell office:value-type="float" office:value="1.26370022303741">
                <text:p>1.26370022303741</text:p>
              </table:table-cell>
              <table:table-cell office:value-type="float" office:value="1.26349249773676">
                <text:p>1.26349249773676</text:p>
              </table:table-cell>
              <table:table-cell office:value-type="float" office:value="1.23151138725204">
                <text:p>1.23151138725204</text:p>
              </table:table-cell>
              <table:table-cell office:value-type="float" office:value="1.2328055095968">
                <text:p>1.2328055095968</text:p>
              </table:table-cell>
              <table:table-cell office:value-type="float" office:value="1.23399081558595">
                <text:p>1.23399081558595</text:p>
              </table:table-cell>
              <table:table-cell office:value-type="float" office:value="1.23508918032696">
                <text:p>1.23508918032696</text:p>
              </table:table-cell>
              <table:table-cell office:value-type="float" office:value="1.23611651639898">
                <text:p>1.23611651639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